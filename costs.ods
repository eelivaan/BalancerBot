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/>
    <style:style style:name="ce5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2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12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i" fo:country="FI" style:language-asian="zh" style:country-asian="CN" style:language-complex="hi" style:country-complex="IN" style:font-name-asian="Noto Sans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spberry Pi Pico 2 W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.13" calcext:value-type="currency">
            <text:p>10.13 €</text:p>
          </table:table-cell>
          <table:table-cell table:style-name="ce6" table:formula="of:=[.C4]*[.D4]" office:value-type="currency" office:currency="EUR" office:value="10.13" calcext:value-type="currency">
            <text:p>10.13 €</text:p>
          </table:table-cell>
          <table:table-cell office:value-type="string" calcext:value-type="string">
            <text:p><text:a xlink:href="https://www.electrokit.com/en/raspberry-pi-pico-2-wh" xlink:type="simple">https://www.electrokit.com/en/raspberry-pi-pico-2-wh</text:a></text:p>
          </table:table-cell>
        </table:table-row>
        <table:table-row table:style-name="ro2">
          <table:table-cell/>
          <table:table-cell office:value-type="string" calcext:value-type="string">
            <text:p>L9110S Motor Driver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5.48" calcext:value-type="currency">
            <text:p>5.48 €</text:p>
          </table:table-cell>
          <table:table-cell table:style-name="ce6" table:formula="of:=[.C5]*[.D5]" office:value-type="currency" office:currency="EUR" office:value="5.48" calcext:value-type="currency">
            <text:p>5.48 €</text:p>
          </table:table-cell>
          <table:table-cell office:value-type="string" calcext:value-type="string">
            <text:p><text:a xlink:href="https://www.electrokit.com/en/gear-motor-with-wheel-3-9vdc" xlink:type="simple">https://www.electrokit.com/en/motor-driver-dual-h-bridge-2.5-12v-0.8a-l9110s</text:a></text:p>
          </table:table-cell>
        </table:table-row>
        <table:table-row table:style-name="ro2">
          <table:table-cell/>
          <table:table-cell office:value-type="string" calcext:value-type="string">
            <text:p>MPU6050 – I2C Gy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04" calcext:value-type="currency">
            <text:p>6.04 €</text:p>
          </table:table-cell>
          <table:table-cell table:style-name="ce6" table:formula="of:=[.C6]*[.D6]" office:value-type="currency" office:currency="EUR" office:value="6.04" calcext:value-type="currency">
            <text:p>6.04 €</text:p>
          </table:table-cell>
          <table:table-cell office:value-type="string" calcext:value-type="string">
            <text:p><text:a xlink:href="https://www.electrokit.com/en/gear-motor-with-wheel-3-9vdc" xlink:type="simple">https://www.electrokit.com/en/mpu-6050-accelerometer-3-axel-gyro-monterad-pa-kort</text:a></text:p>
          </table:table-cell>
        </table:table-row>
        <table:table-row table:style-name="ro2">
          <table:table-cell/>
          <table:table-cell office:value-type="string" calcext:value-type="string">
            <text:p>Motor+Whee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11" calcext:value-type="currency">
            <text:p>5.11 €</text:p>
          </table:table-cell>
          <table:table-cell table:style-name="ce6" table:formula="of:=[.C7]*[.D7]" office:value-type="currency" office:currency="EUR" office:value="10.22" calcext:value-type="currency">
            <text:p>10.22 €</text:p>
          </table:table-cell>
          <table:table-cell office:value-type="string" calcext:value-type="string">
            <text:p><text:a xlink:href="https://www.electrokit.com/en/gear-motor-with-wheel-3-9vdc" xlink:type="simple">https://www.electrokit.com/en/gear-motor-with-wheel-3-9vdc</text:a></text:p>
          </table:table-cell>
        </table:table-row>
        <table:table-row table:style-name="ro2">
          <table:table-cell/>
          <table:table-cell office:value-type="string" calcext:value-type="string">
            <text:p>LiPo 3.7V 1200mAh - JST-P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93" calcext:value-type="currency">
            <text:p>12.93 €</text:p>
          </table:table-cell>
          <table:table-cell table:style-name="ce6" table:formula="of:=[.C8]*[.D8]" office:value-type="currency" office:currency="EUR" office:value="12.93" calcext:value-type="currency">
            <text:p>12.93 €</text:p>
          </table:table-cell>
          <table:table-cell office:value-type="string" calcext:value-type="string">
            <text:p><text:a xlink:href="https://www.electrokit.com/en/gear-motor-with-wheel-3-9vdc" xlink:type="simple">https://www.electrokit.com/en/batteri-lipo-3.7v-1200mah</text:a>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Battery Charger -</text:span> 0.2-2A JS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06" calcext:value-type="currency">
            <text:p>11.06 €</text:p>
          </table:table-cell>
          <table:table-cell table:formula="of:=[.C10]*[.D10]" office:value-type="currency" office:currency="USD" office:value="11.06" calcext:value-type="currency">
            <text:p>$11.06</text:p>
          </table:table-cell>
          <table:table-cell office:value-type="string" calcext:value-type="string">
            <text:p><text:a xlink:href="https://www.electrokit.com/en/gear-motor-with-wheel-3-9vdc" xlink:type="simple">https://www.electrokit.com/en/lipo-laddare-2a-usb-c</text:a></text:p>
          </table:table-cell>
        </table:table-row>
        <table:table-row table:style-name="ro2">
          <table:table-cell/>
          <table:table-cell office:value-type="string" calcext:value-type="string">
            <text:p>Power Booster - 5V 0.5A JS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78" calcext:value-type="currency">
            <text:p>14.78 €</text:p>
          </table:table-cell>
          <table:table-cell table:formula="of:=[.C11]*[.D11]" office:value-type="currency" office:currency="USD" office:value="14.78" calcext:value-type="currency">
            <text:p>$14.78</text:p>
          </table:table-cell>
          <table:table-cell office:value-type="string" calcext:value-type="string">
            <text:p><text:a xlink:href="https://www.electrokit.com/en/gear-motor-with-wheel-3-9vdc" xlink:type="simple">https://www.electrokit.com/en/powerboost-500-basic-5v-usb-boost-500ma-from-1.8v</text:a>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Micro Charger+Booster 1A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27.8" calcext:value-type="currency">
            <text:p>27.80 €</text:p>
          </table:table-cell>
          <table:table-cell table:formula="of:=[.C13]*[.D13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electrokit.com/en/gear-motor-with-wheel-3-9vdc" xlink:type="simple">https://www.electrokit.com/en/powerboost-1000-5v-usb-boost-1a</text:a>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Default" table:formula="of:=SUM([.C4:.C16])" office:value-type="float" office:value="8" calcext:value-type="float">
            <text:p>8</text:p>
          </table:table-cell>
          <table:table-cell table:style-name="Default"/>
          <table:table-cell table:style-name="ce8" table:formula="of:=SUM([.E4:.E16])" office:value-type="currency" office:currency="EUR" office:value="70.64" calcext:value-type="currency">
            <text:p>70.64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6:15:17.933116900</meta:creation-date>
    <dc:date>2026-04-28T17:06:56.389229400</dc:date>
    <meta:editing-duration>PT16M59S</meta:editing-duration>
    <meta:editing-cycles>6</meta:editing-cycles>
    <meta:generator>LibreOffice/25.8.5.2$Windows_X86_64 LibreOffice_project/9c8b85f387cc00a89945a79c9e6239f32e450ac2</meta:generator>
    <meta:document-statistic meta:table-count="1" meta:cell-count="47" meta:object-count="0"/>
  </office:meta>
</office:document-meta>
</file>
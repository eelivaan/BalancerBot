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color="#b2b2b2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/>
    <style:style style:name="ce16" style:family="table-cell" style:parent-style-name="Default" style:data-style-name="N129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" style:family="table-cell" style:parent-style-name="Default" style:data-style-name="N1013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13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b2b2b2"/>
    </style:style>
    <style:style style:name="ce8" style:family="table-cell" style:parent-style-name="Default" style:data-style-name="N1013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i" fo:country="FI" style:language-asian="zh" style:country-asian="CN" style:language-complex="hi" style:country-complex="IN" style:font-name-asian="Noto Sans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Default"/>
        <table:table-column table:style-name="co1" table:number-columns-repeated="16378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16378"/>
        </table:table-row>
        <table:table-row table:style-name="ro1">
          <table:table-cell/>
          <table:table-cell table:style-name="ce10" office:value-type="string" calcext:value-type="string">
            <text:p>Part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Unit price</text:p>
          </table:table-cell>
          <table:table-cell table:style-name="ce10" office:value-type="string" calcext:value-type="string">
            <text:p>Total price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1" office:value-type="string" calcext:value-type="string">
            <text:p>Raspberry Pi Pico 2 WH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currency" office:currency="EUR" office:value="10.13" calcext:value-type="currency">
            <text:p>10.13 €</text:p>
          </table:table-cell>
          <table:table-cell table:style-name="ce19" table:formula="of:=[.C4]*[.D4]" office:value-type="currency" office:currency="EUR" office:value="0" calcext:value-type="currency">
            <text:p>0.00 €</text:p>
          </table:table-cell>
          <table:table-cell table:style-name="ce11" office:value-type="string" calcext:value-type="string">
            <text:p><text:a xlink:href="https://www.electrokit.com/en/raspberry-pi-pico-2-wh" xlink:type="simple">https://www.electrokit.com/en/raspberry-pi-pico-2-wh</text:a></text:p>
          </table:table-cell>
          <table:table-cell table:style-name="ce11" table:number-columns-repeated="16378"/>
        </table:table-row>
        <table:table-row table:style-name="ro2">
          <table:table-cell table:style-name="ce9"/>
          <table:table-cell office:value-type="string" calcext:value-type="string">
            <text:p>L9110S Motor Driver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EUR" office:value="5.48" calcext:value-type="currency">
            <text:p>5.48 €</text:p>
          </table:table-cell>
          <table:table-cell table:style-name="ce6" table:formula="of:=[.C5]*[.D5]" office:value-type="currency" office:currency="EUR" office:value="5.48" calcext:value-type="currency">
            <text:p>5.48 €</text:p>
          </table:table-cell>
          <table:table-cell office:value-type="string" calcext:value-type="string">
            <text:p><text:a xlink:href="https://www.electrokit.com/en/gear-motor-with-wheel-3-9vdc" xlink:type="simple">https://www.electrokit.com/en/motor-driver-dual-h-bridge-2.5-12v-0.8a-l9110s</text:a></text:p>
          </table:table-cell>
          <table:table-cell table:style-name="Default" table:number-columns-repeated="16378"/>
        </table:table-row>
        <table:table-row table:style-name="ro2">
          <table:table-cell table:style-name="ce9"/>
          <table:table-cell office:value-type="string" calcext:value-type="string">
            <text:p>MPU6050 – I2C Gyr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04" calcext:value-type="currency">
            <text:p>6.04 €</text:p>
          </table:table-cell>
          <table:table-cell table:style-name="ce6" table:formula="of:=[.C6]*[.D6]" office:value-type="currency" office:currency="EUR" office:value="6.04" calcext:value-type="currency">
            <text:p>6.04 €</text:p>
          </table:table-cell>
          <table:table-cell office:value-type="string" calcext:value-type="string">
            <text:p><text:a xlink:href="https://www.electrokit.com/en/gear-motor-with-wheel-3-9vdc" xlink:type="simple">https://www.electrokit.com/en/mpu-6050-accelerometer-3-axel-gyro-monterad-pa-kort</text:a></text:p>
          </table:table-cell>
          <table:table-cell table:style-name="Default" table:number-columns-repeated="16378"/>
        </table:table-row>
        <table:table-row table:style-name="ro2">
          <table:table-cell table:style-name="ce9"/>
          <table:table-cell office:value-type="string" calcext:value-type="string">
            <text:p>Motor+Wheel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.11" calcext:value-type="currency">
            <text:p>5.11 €</text:p>
          </table:table-cell>
          <table:table-cell table:style-name="ce6" table:formula="of:=[.C7]*[.D7]" office:value-type="currency" office:currency="EUR" office:value="10.22" calcext:value-type="currency">
            <text:p>10.22 €</text:p>
          </table:table-cell>
          <table:table-cell office:value-type="string" calcext:value-type="string">
            <text:p><text:a xlink:href="https://www.electrokit.com/en/gear-motor-with-wheel-3-9vdc" xlink:type="simple">https://www.electrokit.com/en/gear-motor-with-wheel-3-9vdc</text:a></text:p>
          </table:table-cell>
          <table:table-cell table:style-name="Default" table:number-columns-repeated="16378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1" office:value-type="string" calcext:value-type="string">
            <text:p>LiPo 3.7V 1500mAh - JST-PH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currency" office:currency="EUR" office:value="13.86" calcext:value-type="currency">
            <text:p>13.86 €</text:p>
          </table:table-cell>
          <table:table-cell table:style-name="ce19" table:formula="of:=[.C8]*[.D8]" office:value-type="currency" office:currency="EUR" office:value="0" calcext:value-type="currency">
            <text:p>0.00 €</text:p>
          </table:table-cell>
          <table:table-cell table:style-name="ce11" office:value-type="string" calcext:value-type="string">
            <text:p><text:a xlink:href="https://www.electrokit.com/en/batteri-lipo-3.7v-1500mah" xlink:type="simple">https://www.electrokit.com/en/batteri-lipo-3.7v-1500mah</text:a></text:p>
          </table:table-cell>
          <table:table-cell table:style-name="ce11" table:number-columns-repeated="16378"/>
        </table:table-row>
        <table:table-row table:style-name="ro2">
          <table:table-cell table:style-name="ce9"/>
          <table:table-cell office:value-type="string" calcext:value-type="string">
            <text:p>Breadboard 40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56" calcext:value-type="currency">
            <text:p>4.56 €</text:p>
          </table:table-cell>
          <table:table-cell table:style-name="ce6" table:formula="of:=[.C9]*[.D9]" office:value-type="currency" office:currency="EUR" office:value="4.56" calcext:value-type="currency">
            <text:p>4.56 €</text:p>
          </table:table-cell>
          <table:table-cell office:value-type="string" calcext:value-type="string">
            <text:p><text:a xlink:href="https://www.electrokit.com/en/kopplingsdack-400-anslutningar" xlink:type="simple">https://www.electrokit.com/en/kopplingsdack-400-anslutningar</text:a></text:p>
          </table:table-cell>
          <table:table-cell table:style-name="Default" table:number-columns-repeated="16378"/>
        </table:table-row>
        <table:table-row table:style-name="ro1">
          <table:table-cell table:style-name="ce9"/>
          <table:table-cell/>
          <table:table-cell table:style-name="ce4"/>
          <table:table-cell table:number-columns-repeated="3"/>
          <table:table-cell table:style-name="Default" table:number-columns-repeated="16378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1" office:value-type="string" calcext:value-type="string">
            <text:p><text:span text:style-name="T1">Battery Charger -</text:span> 0.2-2A JST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currency" office:currency="EUR" office:value="11.06" calcext:value-type="currency">
            <text:p>11.06 €</text:p>
          </table:table-cell>
          <table:table-cell table:style-name="ce21" table:formula="of:=[.C11]*[.D11]" office:value-type="currency" office:currency="USD" office:value="0" calcext:value-type="currency">
            <text:p>$0.00</text:p>
          </table:table-cell>
          <table:table-cell table:style-name="ce11" office:value-type="string" calcext:value-type="string">
            <text:p><text:a xlink:href="https://www.electrokit.com/en/gear-motor-with-wheel-3-9vdc" xlink:type="simple">https://www.electrokit.com/en/lipo-laddare-2a-usb-c</text:a></text:p>
          </table:table-cell>
          <table:table-cell table:style-name="ce11" table:number-columns-repeated="16378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1" office:value-type="string" calcext:value-type="string">
            <text:p>Power Booster - 5V 0.5A JST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currency" office:currency="EUR" office:value="14.78" calcext:value-type="currency">
            <text:p>14.78 €</text:p>
          </table:table-cell>
          <table:table-cell table:style-name="ce21" table:formula="of:=[.C12]*[.D12]" office:value-type="currency" office:currency="USD" office:value="0" calcext:value-type="currency">
            <text:p>$0.00</text:p>
          </table:table-cell>
          <table:table-cell table:style-name="ce11" office:value-type="string" calcext:value-type="string">
            <text:p><text:a xlink:href="https://www.electrokit.com/en/powerboost-500-basic-5v-usb-boost-500ma-from-1.8v" xlink:type="simple">https://www.electrokit.com/en/powerboost-500-basic-5v-usb-boost-500ma-from-1.8v</text:a></text:p>
          </table:table-cell>
          <table:table-cell table:style-name="ce11" table:number-columns-repeated="16378"/>
        </table:table-row>
        <table:table-row table:style-name="ro1">
          <table:table-cell table:style-name="ce9"/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9"/>
          <table:table-cell office:value-type="string" calcext:value-type="string">
            <text:p>Micro Charger+Booster 1A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27.8" calcext:value-type="currency">
            <text:p>27.80 €</text:p>
          </table:table-cell>
          <table:table-cell table:formula="of:=[.C14]*[.D14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electrokit.com/en/powerboost-1000-5v-usb-boost-1a" xlink:type="simple">https://www.electrokit.com/en/powerboost-1000-5v-usb-boost-1a</text:a></text:p>
          </table:table-cell>
          <table:table-cell table:style-name="Default" table:number-columns-repeated="16378"/>
        </table:table-row>
        <table:table-row table:style-name="ro1">
          <table:table-cell table:number-columns-repeated="6"/>
          <table:table-cell table:style-name="Default" table:number-columns-repeated="16378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3"/>
          <table:table-cell table:style-name="Default" table:number-columns-repeated="16378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Default" table:formula="of:=SUM([.C4:.C17])" office:value-type="float" office:value="5" calcext:value-type="float">
            <text:p>5</text:p>
          </table:table-cell>
          <table:table-cell table:style-name="Default"/>
          <table:table-cell table:style-name="ce8" table:formula="of:=SUM([.E4:.E17])" office:value-type="currency" office:currency="EUR" office:value="26.3" calcext:value-type="currency">
            <text:p>26.30 €</text:p>
          </table:table-cell>
          <table:table-cell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9P0"/>
    </number:currency-style>
    <number:number-style style:name="N131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 style:data-style-name="N2" text:time-value="13:13:22.218904500"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16:15:17.933116900</meta:creation-date>
    <dc:date>2026-05-03T13:59:11.438474200</dc:date>
    <meta:editing-duration>PT44M56S</meta:editing-duration>
    <meta:editing-cycles>8</meta:editing-cycles>
    <meta:generator>LibreOffice/25.8.5.2$Windows_X86_64 LibreOffice_project/9c8b85f387cc00a89945a79c9e6239f32e450ac2</meta:generator>
    <meta:document-statistic meta:table-count="1" meta:cell-count="56" meta:object-count="0"/>
  </office:meta>
</office:document-meta>
</file>